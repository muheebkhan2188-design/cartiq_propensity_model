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fo:background-color="#7030A0"/>
      <style:text-properties fo:color="#FFFFFF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7030A0"/>
      <style:text-properties fo:color="#FFFFF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fo:background-color="#7030A0"/>
      <style:text-properties fo:color="#FFFFF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19.0235416666667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9.71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4">
            <text:p>Metric Name</text:p>
          </table:table-cell>
          <table:table-cell office:value-type="string" table:style-name="ce5">
            <text:p>Business Definition</text:p>
          </table:table-cell>
          <table:table-cell office:value-type="string" table:style-name="ce5">
            <text:p>Formula / Logic</text:p>
          </table:table-cell>
          <table:table-cell office:value-type="string" table:style-name="ce6">
            <text:p>Required Data Fields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7">
            <text:p>Session Conversion Rate</text:p>
          </table:table-cell>
          <table:table-cell office:value-type="string" table:style-name="ce8">
            <text:p>The percentage of total website sessions that successfully result in a completed purchase</text:p>
          </table:table-cell>
          <table:table-cell office:value-type="string" table:style-name="ce8">
            <text:p>(Total Purchases / Total Sessions) * 100</text:p>
          </table:table-cell>
          <table:table-cell office:value-type="string" table:style-name="ce9">
            <text:p>user_pseudo_id,event_name = 'purchase'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Average Order Value (AOV)</text:p>
          </table:table-cell>
          <table:table-cell office:value-type="string" table:style-name="ce8">
            <text:p>The average monetary amount spent by a user when they complete a transaction</text:p>
          </table:table-cell>
          <table:table-cell office:value-type="string" table:style-name="ce8">
            <text:p>Total Revenue / Total Number of Orders</text:p>
          </table:table-cell>
          <table:table-cell office:value-type="string" table:style-name="ce9">
            <text:p>ecommerce.purchase_revenue,transaction_id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Cart Abandonment Rate</text:p>
          </table:table-cell>
          <table:table-cell office:value-type="string" table:style-name="ce11">
            <text:p>The percentage of users who added an item to their cart but left the website without triggering a purchase event</text:p>
          </table:table-cell>
          <table:table-cell office:value-type="string" table:style-name="ce11">
            <text:p>1 - (Purchases / Add to Carts)</text:p>
          </table:table-cell>
          <table:table-cell office:value-type="string" table:style-name="ce12">
            <text:p>event_name = 'add_to_cart',event_name = 'purchase'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7-06T11:24:32Z</meta:creation-date>
    <dc:date>2026-07-06T11:43:21Z</dc:date>
  </office:meta>
</office:document-meta>
</file>